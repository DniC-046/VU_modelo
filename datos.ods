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Dirección Email</text:p>
          </table:table-cell>
          <table:table-cell office:value-type="string">
            <text:p>Foro:todo el foro Participación Foro - Perfil (Real)</text:p>
          </table:table-cell>
          <table:table-cell office:value-type="string">
            <text:p>Foro:todo el foro Participación Foro Cisto - Huawei (Real)</text:p>
          </table:table-cell>
          <table:table-cell office:value-type="string">
            <text:p>Contenido Interactivo:Perfiles DSM (Real)</text:p>
          </table:table-cell>
          <table:table-cell office:value-type="string">
            <text:p>Contenido Interactivo:Perfiles IRD (Real)</text:p>
          </table:table-cell>
          <table:table-cell office:value-type="string">
            <text:p>Examen:Quizz Desarrollo Software (Real)</text:p>
          </table:table-cell>
          <table:table-cell office:value-type="string">
            <text:p>Examen:Quizz - Redes (Real)</text:p>
          </table:table-cell>
          <table:table-cell office:value-type="string">
            <text:p>Examen:Quizz - Sistemas y BD (Real)</text:p>
          </table:table-cell>
          <table:table-cell office:value-type="string">
            <text:p>Examen:Quizz - Modelo Educativo (Real)</text:p>
          </table:table-cell>
          <table:table-cell office:value-type="string">
            <text:p>Examen:Quizz Cisco - Huawei (Real)</text:p>
          </table:table-cell>
          <table:table-cell office:value-type="string">
            <text:p>Examen:Quizz - Educación Ambiental (Real)</text:p>
          </table:table-cell>
          <table:table-cell office:value-type="string">
            <text:p>Total del curso (Real)</text:p>
          </table:table-cell>
          <table:table-cell office:value-type="string">
            <text:p>Último descargado desde este curso</text:p>
          </table:table-cell>
        </table:table-row>
        <table:table-row>
          <table:table-cell office:value-type="string">
            <text:p>ALAN BERTIN</text:p>
          </table:table-cell>
          <table:table-cell office:value-type="string">
            <text:p>AGUIRRE MORA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anbam0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DAVID OMAR</text:p>
          </table:table-cell>
          <table:table-cell office:value-type="string">
            <text:p>ALCANTARA RAMI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cantarad178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56">
            <text:p>9.56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20">
            <text:p>7.2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LAN</text:p>
          </table:table-cell>
          <table:table-cell office:value-type="string">
            <text:p>ALVARADO ESPEJ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analvarado738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NGEL</text:p>
          </table:table-cell>
          <table:table-cell office:value-type="string">
            <text:p>ALVARADO HERR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gelclash676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38">
            <text:p>9.38</text:p>
          </table:table-cell>
          <table:table-cell office:value-type="float" office:value="10.00">
            <text:p>10.00</text:p>
          </table:table-cell>
          <table:table-cell office:value-type="float" office:value="9.45">
            <text:p>9.45</text:p>
          </table:table-cell>
          <table:table-cell office:value-type="float" office:value="9.33">
            <text:p>9.33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02">
            <text:p>7.02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LEXIS GUADALUPE</text:p>
          </table:table-cell>
          <table:table-cell office:value-type="string">
            <text:p>ALVAREZ CONTRER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is.g.alvarezcontreras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LUIS JOSUE</text:p>
          </table:table-cell>
          <table:table-cell office:value-type="string">
            <text:p>AMADOR RODRI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driguezamadorjosue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TADEO EMILIANO</text:p>
          </table:table-cell>
          <table:table-cell office:value-type="string">
            <text:p>AMIGON SALAZ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ilianoamigon9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BRENDA THALIA</text:p>
          </table:table-cell>
          <table:table-cell office:value-type="string">
            <text:p>ANAYA GUZM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aliaanyguz070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45">
            <text:p>9.45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68">
            <text:p>3.68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NGEL</text:p>
          </table:table-cell>
          <table:table-cell office:value-type="string">
            <text:p>ANDRADE MONDRAG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gelitoski34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CINTIA ABIGAIL</text:p>
          </table:table-cell>
          <table:table-cell office:value-type="string">
            <text:p>ANGELES GONZA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bigailangeles809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17">
            <text:p>9.17</text:p>
          </table:table-cell>
          <table:table-cell office:value-type="float" office:value="10.00">
            <text:p>10.00</text:p>
          </table:table-cell>
          <table:table-cell office:value-type="float" office:value="9.45">
            <text:p>9.45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33">
            <text:p>7.33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MIGUEL ANGEL</text:p>
          </table:table-cell>
          <table:table-cell office:value-type="string">
            <text:p>ANTONIO RAMI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guel.antram24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13">
            <text:p>8.13</text:p>
          </table:table-cell>
          <table:table-cell office:value-type="float" office:value="9.00">
            <text:p>9.00</text:p>
          </table:table-cell>
          <table:table-cell office:value-type="float" office:value="9.45">
            <text:p>9.45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7">
            <text:p>7.07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OSUE RAZIEL</text:p>
          </table:table-cell>
          <table:table-cell office:value-type="string">
            <text:p>APOLINAR DON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uerazielapolinar270906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FERNANDA CECILIA</text:p>
          </table:table-cell>
          <table:table-cell office:value-type="string">
            <text:p>ARELLANO CARMO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ernanda.cecilia140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NGEL</text:p>
          </table:table-cell>
          <table:table-cell office:value-type="string">
            <text:p>ARELLANO MORA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am20074mora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MICHAEL GERARDO</text:p>
          </table:table-cell>
          <table:table-cell office:value-type="string">
            <text:p>ARMENTA SIMB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laserreaiden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SERGIO ALEJANDRO</text:p>
          </table:table-cell>
          <table:table-cell office:value-type="string">
            <text:p>AVALOS MELE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ravalos120603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75">
            <text:p>0.75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FERNANDO</text:p>
          </table:table-cell>
          <table:table-cell office:value-type="string">
            <text:p>BADILLO VARG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xome17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13">
            <text:p>8.13</text:p>
          </table:table-cell>
          <table:table-cell office:value-type="float" office:value="8.00">
            <text:p>8.00</text:p>
          </table:table-cell>
          <table:table-cell office:value-type="float" office:value="9.45">
            <text:p>9.45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20">
            <text:p>9.2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LIZBETH MONSERRAT</text:p>
          </table:table-cell>
          <table:table-cell office:value-type="string">
            <text:p>BALDERAS HERNA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nserrat.balderas.hernandez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NTONIO ALEJANDRO</text:p>
          </table:table-cell>
          <table:table-cell office:value-type="string">
            <text:p>BALDERAS MEDI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toniobalderasmedina9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56">
            <text:p>9.56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33">
            <text:p>9.33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36">
            <text:p>7.36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ROXANA GABRIELA</text:p>
          </table:table-cell>
          <table:table-cell office:value-type="string">
            <text:p>BARRERA CRESP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xanaborja.273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ESTEBAN JAIR</text:p>
          </table:table-cell>
          <table:table-cell office:value-type="string">
            <text:p>BARRERA GUTIER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ayobarrera10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15">
            <text:p>4.15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2">
            <text:p>8.02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OSE MANUEL</text:p>
          </table:table-cell>
          <table:table-cell office:value-type="string">
            <text:p>BARRIENTOS MAY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manuelbarrientos341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FAUSTO JOSE</text:p>
          </table:table-cell>
          <table:table-cell office:value-type="string">
            <text:p>BAUTISTA LEYV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ustojosebautistaleyv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VICTOR ALDAIR</text:p>
          </table:table-cell>
          <table:table-cell office:value-type="string">
            <text:p>BAUTISTA MELEC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bautistamelecio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38">
            <text:p>9.38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17">
            <text:p>7.17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BYRON ANDRES</text:p>
          </table:table-cell>
          <table:table-cell office:value-type="string">
            <text:p>BAUTISTA VALDOVIN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dsatanlol69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OSE ANGEL</text:p>
          </table:table-cell>
          <table:table-cell office:value-type="string">
            <text:p>BENITEZ CHAVARR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angelbenitezchavarria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13">
            <text:p>8.13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6.77">
            <text:p>6.77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ngel Yahir</text:p>
          </table:table-cell>
          <table:table-cell office:value-type="string">
            <text:p>Bernabe Bernab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ahirbernabe68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RAUL ARIEL</text:p>
          </table:table-cell>
          <table:table-cell office:value-type="string">
            <text:p>CARDENAS PUEB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aua.carp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96">
            <text:p>8.96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12">
            <text:p>7.12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CHRISTOPHER</text:p>
          </table:table-cell>
          <table:table-cell office:value-type="string">
            <text:p>CARMONA LO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risrobin.n3u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MARIA PAOLA</text:p>
          </table:table-cell>
          <table:table-cell office:value-type="string">
            <text:p>CARNDEAS CASTIL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iapaolacardenascastillo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ROGELIO</text:p>
          </table:table-cell>
          <table:table-cell office:value-type="string">
            <text:p>CASTELLANOS FLO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caflo0425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38">
            <text:p>9.38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92">
            <text:p>9.92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KIMBERLY JIMENA</text:p>
          </table:table-cell>
          <table:table-cell office:value-type="string">
            <text:p>CERVATES FLO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ervantesjimena62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NICOLAS ALEXANDER</text:p>
          </table:table-cell>
          <table:table-cell office:value-type="string">
            <text:p>COLIN SILV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icokelpro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DONNOVAN OBRIAN</text:p>
          </table:table-cell>
          <table:table-cell office:value-type="string">
            <text:p>CORNEJO MORE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onnovan.cornejo47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35">
            <text:p>4.35</text:p>
          </table:table-cell>
          <table:table-cell office:value-type="float" office:value="8.00">
            <text:p>8.00</text:p>
          </table:table-cell>
          <table:table-cell office:value-type="float" office:value="9.45">
            <text:p>9.45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8.23">
            <text:p>8.23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ARON</text:p>
          </table:table-cell>
          <table:table-cell office:value-type="string">
            <text:p>CORONEL SAENZ DE SICIL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aringa96n.n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DERICK IRVIN</text:p>
          </table:table-cell>
          <table:table-cell office:value-type="string">
            <text:p>CRUZ GUTIER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apa.cruz0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21">
            <text:p>5.21</text:p>
          </table:table-cell>
          <table:table-cell office:value-type="float" office:value="7.00">
            <text:p>7.00</text:p>
          </table:table-cell>
          <table:table-cell office:value-type="float" office:value="8.34">
            <text:p>8.34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82">
            <text:p>8.82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UAN PABLO</text:p>
          </table:table-cell>
          <table:table-cell office:value-type="string">
            <text:p>CRUZ HERNA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c859741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TZIRI MARLEN</text:p>
          </table:table-cell>
          <table:table-cell office:value-type="string">
            <text:p>CRUZ LOZ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lenlozano170904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NGEL ISRAEL</text:p>
          </table:table-cell>
          <table:table-cell office:value-type="string">
            <text:p>CRUZ MARTI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i458522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OHAN YAEL</text:p>
          </table:table-cell>
          <table:table-cell office:value-type="string">
            <text:p>DEL RIO CAMP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han.yrc134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OSWALDO</text:p>
          </table:table-cell>
          <table:table-cell office:value-type="string">
            <text:p>DEL TORO SA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waldodeltorosanchez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45">
            <text:p>9.45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18">
            <text:p>7.18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DANA PAOLA</text:p>
          </table:table-cell>
          <table:table-cell office:value-type="string">
            <text:p>DELGADILLO SOS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lgadanapaola53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FRANCISCO JOSUE</text:p>
          </table:table-cell>
          <table:table-cell office:value-type="string">
            <text:p>ESCALONA MENDO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onajosue0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ONATHAN</text:p>
          </table:table-cell>
          <table:table-cell office:value-type="string">
            <text:p>ESCOBAR SA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obar17mc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EVANGELISTA GRANIL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ielans.12.1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4">
            <text:p>8.54</text:p>
          </table:table-cell>
          <table:table-cell office:value-type="float" office:value="10.00">
            <text:p>10.00</text:p>
          </table:table-cell>
          <table:table-cell office:value-type="float" office:value="7.79">
            <text:p>7.79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9.04">
            <text:p>9.04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ESUS MIGUEL</text:p>
          </table:table-cell>
          <table:table-cell office:value-type="string">
            <text:p>FERNANDEZ RE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susmigueluttec@gmail.com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45">
            <text:p>9.45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7.93">
            <text:p>7.93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NADIA J0VANNA</text:p>
          </table:table-cell>
          <table:table-cell office:value-type="string">
            <text:p>FIERRO TAP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ulaandreafierrotapi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4">
            <text:p>8.54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19">
            <text:p>9.19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UZIEL OSWALDO</text:p>
          </table:table-cell>
          <table:table-cell office:value-type="string">
            <text:p>FLORES FLO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loresuziel841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YERIK</text:p>
          </table:table-cell>
          <table:table-cell office:value-type="string">
            <text:p>FLORES HIPOL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rikflores.h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IRVING RENE</text:p>
          </table:table-cell>
          <table:table-cell office:value-type="string">
            <text:p>FRAGOSO ROJ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ragosoirving777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CHRISTOPHER YAHEL</text:p>
          </table:table-cell>
          <table:table-cell office:value-type="string">
            <text:p>GALAN RIV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alanyahel4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DYLAN MIGUEL</text:p>
          </table:table-cell>
          <table:table-cell office:value-type="string">
            <text:p>GALINDO TOR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ylmik2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27">
            <text:p>7.27</text:p>
          </table:table-cell>
          <table:table-cell office:value-type="float" office:value="7.00">
            <text:p>7.00</text:p>
          </table:table-cell>
          <table:table-cell office:value-type="float" office:value="9.45">
            <text:p>9.45</text:p>
          </table:table-cell>
          <table:table-cell office:value-type="float" office:value="8.67">
            <text:p>8.67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55">
            <text:p>6.55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SANDRA ELIZABETH</text:p>
          </table:table-cell>
          <table:table-cell office:value-type="string">
            <text:p>GARCIA GARC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ags070722mmcrrna20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DIEGO</text:p>
          </table:table-cell>
          <table:table-cell office:value-type="string">
            <text:p>GARCIA MU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arciamunozd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LEX ISRAEL</text:p>
          </table:table-cell>
          <table:table-cell office:value-type="string">
            <text:p>GARCIA SU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iokito07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NOE SANTIAGO</text:p>
          </table:table-cell>
          <table:table-cell office:value-type="string">
            <text:p>GARCIA TIBURC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esantiagogarciatiburcio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DYLAN AZAHED</text:p>
          </table:table-cell>
          <table:table-cell office:value-type="string">
            <text:p>GAYOSSO COSTIL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ayossocostillad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MARIA FERNANDA</text:p>
          </table:table-cell>
          <table:table-cell office:value-type="string">
            <text:p>GODINEZ VENEG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g0799558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17">
            <text:p>9.17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40">
            <text:p>7.4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OSE JUAN</text:p>
          </table:table-cell>
          <table:table-cell office:value-type="string">
            <text:p>GONZALEZ BARRIG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juangonzalezbarrig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LEJANDRO</text:p>
          </table:table-cell>
          <table:table-cell office:value-type="string">
            <text:p>GONZALEZ MUÑ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jandrogm5546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63">
            <text:p>9.63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DIEGO RODRIGO</text:p>
          </table:table-cell>
          <table:table-cell office:value-type="string">
            <text:p>GONZALEZ NAVAR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oomergo.54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2">
            <text:p>6.02</text:p>
          </table:table-cell>
          <table:table-cell office:value-type="float" office:value="7.00">
            <text:p>7.00</text:p>
          </table:table-cell>
          <table:table-cell office:value-type="float" office:value="9.45">
            <text:p>9.45</text:p>
          </table:table-cell>
          <table:table-cell office:value-type="float" office:value="9.33">
            <text:p>9.33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48">
            <text:p>6.48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CARLOS MANUEL</text:p>
          </table:table-cell>
          <table:table-cell office:value-type="string">
            <text:p>GUDIÑO SA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udinocarlos33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LEONARDO</text:p>
          </table:table-cell>
          <table:table-cell office:value-type="string">
            <text:p>GUERRERO JU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linoxgro12947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LEXANDER</text:p>
          </table:table-cell>
          <table:table-cell office:value-type="string">
            <text:p>GUTIERREZ MORA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andergutierrezmorales30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13">
            <text:p>8.13</text:p>
          </table:table-cell>
          <table:table-cell office:value-type="float" office:value="5.00">
            <text:p>5.00</text:p>
          </table:table-cell>
          <table:table-cell office:value-type="float" office:value="8.34">
            <text:p>8.34</text:p>
          </table:table-cell>
          <table:table-cell office:value-type="float" office:value="7.33">
            <text:p>7.33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5.72">
            <text:p>5.72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ISAAC</text:p>
          </table:table-cell>
          <table:table-cell office:value-type="string">
            <text:p>GUTIERREZ NAVARRE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aacgutierritos5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FATIMA</text:p>
          </table:table-cell>
          <table:table-cell office:value-type="string">
            <text:p>HERNANDES BAUTIS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tima151274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79">
            <text:p>9.79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6.72">
            <text:p>6.72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LDO RODRIGO</text:p>
          </table:table-cell>
          <table:table-cell office:value-type="string">
            <text:p>HERNANDEZ BALTAZ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dorodrigohernandezbaltazar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LUIS FERNANDO</text:p>
          </table:table-cell>
          <table:table-cell office:value-type="string">
            <text:p>HERNANDEZ GARC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zferna.28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OSHUA ARIZAIR</text:p>
          </table:table-cell>
          <table:table-cell office:value-type="string">
            <text:p>HERNANDEZ GUTIER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hherguti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45">
            <text:p>9.45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43">
            <text:p>7.43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RAFAEL ALEJANDRO</text:p>
          </table:table-cell>
          <table:table-cell office:value-type="string">
            <text:p>HERNANDEZ HUER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h6055485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59">
            <text:p>9.59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MARIO ISMAEL</text:p>
          </table:table-cell>
          <table:table-cell office:value-type="string">
            <text:p>HERNANDEZ LO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mael.hernandez0906@gmail.com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79">
            <text:p>7.7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22">
            <text:p>2.22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RODRIGO AZAEL</text:p>
          </table:table-cell>
          <table:table-cell office:value-type="string">
            <text:p>HERNANDEZ RODRI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drigohernandezzd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6.44">
            <text:p>6.44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LEVI SANTIAGO</text:p>
          </table:table-cell>
          <table:table-cell office:value-type="string">
            <text:p>HERNANDEZ ROS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evih9164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38">
            <text:p>9.38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92">
            <text:p>6.92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CAROLINA</text:p>
          </table:table-cell>
          <table:table-cell office:value-type="string">
            <text:p>HERNANDEZ SANT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olinaaa857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OHANN ALEJANDRO</text:p>
          </table:table-cell>
          <table:table-cell office:value-type="string">
            <text:p>HERNANDEZ VAZQ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hann.ahv2211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94">
            <text:p>8.94</text:p>
          </table:table-cell>
          <table:table-cell office:value-type="float" office:value="10.00">
            <text:p>10.00</text:p>
          </table:table-cell>
          <table:table-cell office:value-type="float" office:value="9.45">
            <text:p>9.45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6.80">
            <text:p>6.8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PAULINA ELIZABETH</text:p>
          </table:table-cell>
          <table:table-cell office:value-type="string">
            <text:p>HERNANDEZ VELAS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ulinaelizabeth2007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PAULINA ELIZABETH</text:p>
          </table:table-cell>
          <table:table-cell office:value-type="string">
            <text:p>HERNANDEZ VELAS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ulinahdzvlc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33">
            <text:p>9.33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39">
            <text:p>9.39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LUNA IVONNE</text:p>
          </table:table-cell>
          <table:table-cell office:value-type="string">
            <text:p>HERRERA CRU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chirula.herrera.cruz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FERNANDA AILEN</text:p>
          </table:table-cell>
          <table:table-cell office:value-type="string">
            <text:p>JACINTO QUIR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ilenfq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79">
            <text:p>4.79</text:p>
          </table:table-cell>
          <table:table-cell office:value-type="float" office:value="5.00">
            <text:p>5.00</text:p>
          </table:table-cell>
          <table:table-cell office:value-type="float" office:value="7.79">
            <text:p>7.79</text:p>
          </table:table-cell>
          <table:table-cell office:value-type="float" office:value="4.00">
            <text:p>4.00</text:p>
          </table:table-cell>
          <table:table-cell office:value-type="float" office:value="4.00">
            <text:p>4.00</text:p>
          </table:table-cell>
          <table:table-cell office:value-type="float" office:value="10.00">
            <text:p>10.00</text:p>
          </table:table-cell>
          <table:table-cell office:value-type="float" office:value="4.45">
            <text:p>4.45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BRAYAN ISMAEL</text:p>
          </table:table-cell>
          <table:table-cell office:value-type="string">
            <text:p>JIMENEZ CHAV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maeljimenezch107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2.50">
            <text:p>2.5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Gaby_prueba</text:p>
          </table:table-cell>
          <table:table-cell office:value-type="string">
            <text:p>Jimenez Enci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jimeneze.uttecamac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MIGUEL ANGEL</text:p>
          </table:table-cell>
          <table:table-cell office:value-type="string">
            <text:p>JIMENEZ PE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guelangeljp100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25">
            <text:p>7.25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CRISTIAN</text:p>
          </table:table-cell>
          <table:table-cell office:value-type="string">
            <text:p>JIMENEZ SA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ianjimenez23120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LI GAEL</text:p>
          </table:table-cell>
          <table:table-cell office:value-type="string">
            <text:p>JIMENEZ ZA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dacitoaligael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ORGE ANTONIO</text:p>
          </table:table-cell>
          <table:table-cell office:value-type="string">
            <text:p>JUAREZ GAMBO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g5773038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AVIER ALEXANDER</text:p>
          </table:table-cell>
          <table:table-cell office:value-type="string">
            <text:p>JUAREZ GUTIER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rezalexander486@gmail.com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92">
            <text:p>2.92</text:p>
          </table:table-cell>
          <table:table-cell office:value-type="float" office:value="7.00">
            <text:p>7.00</text:p>
          </table:table-cell>
          <table:table-cell office:value-type="float" office:value="8.34">
            <text:p>8.34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53">
            <text:p>4.53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SERGIO</text:p>
          </table:table-cell>
          <table:table-cell office:value-type="string">
            <text:p>JUAREZ GUTIER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odyokami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9.50">
            <text:p>9.5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GAEL DAVID</text:p>
          </table:table-cell>
          <table:table-cell office:value-type="string">
            <text:p>JUAREZ ROJ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rezrojogael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38">
            <text:p>9.38</text:p>
          </table:table-cell>
          <table:table-cell office:value-type="float" office:value="10.00">
            <text:p>10.00</text:p>
          </table:table-cell>
          <table:table-cell office:value-type="float" office:value="9.45">
            <text:p>9.45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10">
            <text:p>7.1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LUIS ERNESTO</text:p>
          </table:table-cell>
          <table:table-cell office:value-type="string">
            <text:p>LEAL INIES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leal1734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FATIMA ESMERALDA</text:p>
          </table:table-cell>
          <table:table-cell office:value-type="string">
            <text:p>LEMUS BUC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tibucio988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SANTIAGO ISAI</text:p>
          </table:table-cell>
          <table:table-cell office:value-type="string">
            <text:p>LIBREROS RAMI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tylibreros532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SAMANTHA VIRIDIANA</text:p>
          </table:table-cell>
          <table:table-cell office:value-type="string">
            <text:p>LLANOS RAMI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lanosviridiana9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SURI</text:p>
          </table:table-cell>
          <table:table-cell office:value-type="string">
            <text:p>LOBATO NOP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rilobato42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DAYRA RUBI</text:p>
          </table:table-cell>
          <table:table-cell office:value-type="string">
            <text:p>LOPEZ ALV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nditasud8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USTIN MISSIEL</text:p>
          </table:table-cell>
          <table:table-cell office:value-type="string">
            <text:p>LOPEZ CE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stinmissiel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50">
            <text:p>9.5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BRANDON ALEXANDER</text:p>
          </table:table-cell>
          <table:table-cell office:value-type="string">
            <text:p>LOPEZ GARRI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andonalg15100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DRIANA GUADALUPE</text:p>
          </table:table-cell>
          <table:table-cell office:value-type="string">
            <text:p>LUNA ACOS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dri.lupita2006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RICHARD</text:p>
          </table:table-cell>
          <table:table-cell office:value-type="string">
            <text:p>MALAGA CASTREJ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ichmlgq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38">
            <text:p>9.38</text:p>
          </table:table-cell>
          <table:table-cell office:value-type="float" office:value="10.00">
            <text:p>10.00</text:p>
          </table:table-cell>
          <table:table-cell office:value-type="float" office:value="9.45">
            <text:p>9.45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6.85">
            <text:p>6.85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LLISSON MAYRIN</text:p>
          </table:table-cell>
          <table:table-cell office:value-type="string">
            <text:p>MALDONADO MON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ntesmaai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47">
            <text:p>9.47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MARCO IVAN</text:p>
          </table:table-cell>
          <table:table-cell office:value-type="string">
            <text:p>MARQUEZ ALLEN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c02lima2006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42">
            <text:p>5.42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33">
            <text:p>9.33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09">
            <text:p>9.09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DIEGO GAEL</text:p>
          </table:table-cell>
          <table:table-cell office:value-type="string">
            <text:p>MARTINEZ HERNA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ael00pm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FRANCISCO OSWALDO</text:p>
          </table:table-cell>
          <table:table-cell office:value-type="string">
            <text:p>MARTINEZ HERNA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t95024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33">
            <text:p>5.33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42">
            <text:p>9.42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CHRISTHIAN</text:p>
          </table:table-cell>
          <table:table-cell office:value-type="string">
            <text:p>MARTINEZ LO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ianlop09ez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.75">
            <text:p>1.75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XEL CISSE</text:p>
          </table:table-cell>
          <table:table-cell office:value-type="string">
            <text:p>MARTINEZ MARTI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mmcisse291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33">
            <text:p>9.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17">
            <text:p>1.17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OSUA EMMANUEL</text:p>
          </table:table-cell>
          <table:table-cell office:value-type="string">
            <text:p>MARTINEZ MORE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uamartinez698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BRAYAN</text:p>
          </table:table-cell>
          <table:table-cell office:value-type="string">
            <text:p>MARTINEZ QUINTANIL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ayanx52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BDIEL ALEJANDRO</text:p>
          </table:table-cell>
          <table:table-cell office:value-type="string">
            <text:p>MARTINEZ SUBIA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tinezsubiaurabdielalejandro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DIEGO</text:p>
          </table:table-cell>
          <table:table-cell office:value-type="string">
            <text:p>MARTINEZ VAZQ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eg769dh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38">
            <text:p>9.38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6.67">
            <text:p>6.67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INGRID AMIDORY</text:p>
          </table:table-cell>
          <table:table-cell office:value-type="string">
            <text:p>MATEO HERNA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m6919599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MARIA FERNANDA</text:p>
          </table:table-cell>
          <table:table-cell office:value-type="string">
            <text:p>MEDINA HERNA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iafernandamedina0412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33">
            <text:p>8.33</text:p>
          </table:table-cell>
          <table:table-cell office:value-type="float" office:value="10.00">
            <text:p>10.00</text:p>
          </table:table-cell>
          <table:table-cell office:value-type="float" office:value="9.45">
            <text:p>9.45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6.97">
            <text:p>6.97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FATIMA</text:p>
          </table:table-cell>
          <table:table-cell office:value-type="string">
            <text:p>MEDRANO SA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timamedsan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94">
            <text:p>8.94</text:p>
          </table:table-cell>
          <table:table-cell office:value-type="float" office:value="8.00">
            <text:p>8.00</text:p>
          </table:table-cell>
          <table:table-cell office:value-type="float" office:value="9.45">
            <text:p>9.45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6.30">
            <text:p>6.3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ERIK VICTOR</text:p>
          </table:table-cell>
          <table:table-cell office:value-type="string">
            <text:p>MEJIA FRAN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rikvictor.m.f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13">
            <text:p>8.13</text:p>
          </table:table-cell>
          <table:table-cell office:value-type="float" office:value="10.00">
            <text:p>10.00</text:p>
          </table:table-cell>
          <table:table-cell office:value-type="float" office:value="9.45">
            <text:p>9.45</text:p>
          </table:table-cell>
          <table:table-cell office:value-type="float" office:value="9.33">
            <text:p>9.33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36">
            <text:p>9.36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HANSEL RAZIEL</text:p>
          </table:table-cell>
          <table:table-cell office:value-type="string">
            <text:p>MENDOZA GARC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azmendoza04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38">
            <text:p>9.38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17">
            <text:p>7.17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EDSSON DE JESUS</text:p>
          </table:table-cell>
          <table:table-cell office:value-type="string">
            <text:p>MENDOZA HERNA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ndoza20429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75">
            <text:p>9.75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TANIA</text:p>
          </table:table-cell>
          <table:table-cell office:value-type="string">
            <text:p>MENDOZA PO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aniaponce077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46">
            <text:p>6.46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8.56">
            <text:p>8.56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KATHERINE</text:p>
          </table:table-cell>
          <table:table-cell office:value-type="string">
            <text:p>MEZA BUSTILL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meza8157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71">
            <text:p>7.71</text:p>
          </table:table-cell>
          <table:table-cell office:value-type="float" office:value="9.00">
            <text:p>9.00</text:p>
          </table:table-cell>
          <table:table-cell office:value-type="float" office:value="8.30">
            <text:p>8.3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6.38">
            <text:p>6.38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CARLOS OSWALDO</text:p>
          </table:table-cell>
          <table:table-cell office:value-type="string">
            <text:p>MIGUEL VALENC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sstaygameryt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YAZMIN</text:p>
          </table:table-cell>
          <table:table-cell office:value-type="string">
            <text:p>MIRANDA CRISAN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azmiranda1234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13">
            <text:p>8.13</text:p>
          </table:table-cell>
          <table:table-cell office:value-type="float" office:value="9.00">
            <text:p>9.00</text:p>
          </table:table-cell>
          <table:table-cell office:value-type="float" office:value="9.45">
            <text:p>9.45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32">
            <text:p>9.32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YAHEL</text:p>
          </table:table-cell>
          <table:table-cell office:value-type="string">
            <text:p>MIRANDA GARC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ahel.m.g.06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45">
            <text:p>9.45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18">
            <text:p>9.18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DAFNE ALEJANDRA</text:p>
          </table:table-cell>
          <table:table-cell office:value-type="string">
            <text:p>MOLINA GUER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fsmoli0605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CECILIA JANETH</text:p>
          </table:table-cell>
          <table:table-cell office:value-type="string">
            <text:p>MONROY ANGUI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eciliamonroy066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38">
            <text:p>9.38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92">
            <text:p>9.92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LEXA MARLENE</text:p>
          </table:table-cell>
          <table:table-cell office:value-type="string">
            <text:p>MONROY CRU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monroy172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float" office:value="10.00">
            <text:p>10.00</text:p>
          </table:table-cell>
          <table:table-cell office:value-type="float" office:value="9.45">
            <text:p>9.45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6.77">
            <text:p>6.77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MONTIEL LU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ntiellunadaniel19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ARON</text:p>
          </table:table-cell>
          <table:table-cell office:value-type="string">
            <text:p>MUNGUIA AGUIL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aronmunguia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38">
            <text:p>9.38</text:p>
          </table:table-cell>
          <table:table-cell office:value-type="float" office:value="10.00">
            <text:p>10.00</text:p>
          </table:table-cell>
          <table:table-cell office:value-type="float" office:value="9.45">
            <text:p>9.45</text:p>
          </table:table-cell>
          <table:table-cell office:value-type="float" office:value="9.33">
            <text:p>9.33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27">
            <text:p>7.27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DANIELA</text:p>
          </table:table-cell>
          <table:table-cell office:value-type="string">
            <text:p>MUÑOZ CEBALL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ielamunozceballos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30">
            <text:p>8.3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6.91">
            <text:p>6.91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SOFIA</text:p>
          </table:table-cell>
          <table:table-cell office:value-type="string">
            <text:p>NORIEGA FRAGO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noriegafragoso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17">
            <text:p>9.17</text:p>
          </table:table-cell>
          <table:table-cell office:value-type="float" office:value="10.00">
            <text:p>10.00</text:p>
          </table:table-cell>
          <table:table-cell office:value-type="float" office:value="9.45">
            <text:p>9.45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83">
            <text:p>6.83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MELISSA ANAHI</text:p>
          </table:table-cell>
          <table:table-cell office:value-type="string">
            <text:p>NUEZ APARIC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lissanunez46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ESUS TADEO</text:p>
          </table:table-cell>
          <table:table-cell office:value-type="string">
            <text:p>NUÑEZ HUARACH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n521720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38">
            <text:p>9.38</text:p>
          </table:table-cell>
          <table:table-cell office:value-type="float" office:value="10.00">
            <text:p>10.00</text:p>
          </table:table-cell>
          <table:table-cell office:value-type="float" office:value="9.45">
            <text:p>9.45</text:p>
          </table:table-cell>
          <table:table-cell office:value-type="float" office:value="9.33">
            <text:p>9.33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52">
            <text:p>9.52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TANIA</text:p>
          </table:table-cell>
          <table:table-cell office:value-type="string">
            <text:p>OLVERA RE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uyushi02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50">
            <text:p>7.5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YAMIL ZURIEL</text:p>
          </table:table-cell>
          <table:table-cell office:value-type="string">
            <text:p>OROPEZA MELCH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oyam56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58">
            <text:p>9.58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70">
            <text:p>9.7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MARIANA</text:p>
          </table:table-cell>
          <table:table-cell office:value-type="string">
            <text:p>ORTEGA RAMI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tegaramirezmariana19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56">
            <text:p>9.56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6.95">
            <text:p>6.95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HECTOR RAMSES</text:p>
          </table:table-cell>
          <table:table-cell office:value-type="string">
            <text:p>ORTEGA TEODO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ctor.ortega.030805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17">
            <text:p>9.17</text:p>
          </table:table-cell>
          <table:table-cell office:value-type="float" office:value="10.00">
            <text:p>10.00</text:p>
          </table:table-cell>
          <table:table-cell office:value-type="float" office:value="9.45">
            <text:p>9.45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8.08">
            <text:p>8.08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OSE ANGEL</text:p>
          </table:table-cell>
          <table:table-cell office:value-type="string">
            <text:p>ORTIZ RAMI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tizangel4442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94">
            <text:p>8.94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37">
            <text:p>7.37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ERICK KAIN</text:p>
          </table:table-cell>
          <table:table-cell office:value-type="string">
            <text:p>ORTIZ RODRI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rickkain133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FATIMA GUADALUPE</text:p>
          </table:table-cell>
          <table:table-cell office:value-type="string">
            <text:p>PACHUCA LO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l695944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XEL DONOVAN</text:p>
          </table:table-cell>
          <table:table-cell office:value-type="string">
            <text:p>PAULINO ROM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roaxdo17ag2007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38">
            <text:p>9.38</text:p>
          </table:table-cell>
          <table:table-cell office:value-type="float" office:value="10.00">
            <text:p>10.00</text:p>
          </table:table-cell>
          <table:table-cell office:value-type="float" office:value="9.45">
            <text:p>9.45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60">
            <text:p>9.6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MARIANA</text:p>
          </table:table-cell>
          <table:table-cell office:value-type="string">
            <text:p>PEREZ BELTR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ubeltran0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96">
            <text:p>3.96</text:p>
          </table:table-cell>
          <table:table-cell office:value-type="float" office:value="7.00">
            <text:p>7.00</text:p>
          </table:table-cell>
          <table:table-cell office:value-type="float" office:value="9.45">
            <text:p>9.45</text:p>
          </table:table-cell>
          <table:table-cell office:value-type="float" office:value="9.33">
            <text:p>9.33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5.72">
            <text:p>5.72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DAREN RAMSES</text:p>
          </table:table-cell>
          <table:table-cell office:value-type="string">
            <text:p>PERNALETE AVI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daren9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NGEL</text:p>
          </table:table-cell>
          <table:table-cell office:value-type="string">
            <text:p>PICHARDO RIV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rakobunbury82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45">
            <text:p>9.45</text:p>
          </table:table-cell>
          <table:table-cell office:value-type="float" office:value="9.33">
            <text:p>9.33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6.85">
            <text:p>6.85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RAUL</text:p>
          </table:table-cell>
          <table:table-cell office:value-type="string">
            <text:p>PINA FLO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omasvilla052@gmail.com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83">
            <text:p>5.83</text:p>
          </table:table-cell>
          <table:table-cell office:value-type="float" office:value="9.00">
            <text:p>9.00</text:p>
          </table:table-cell>
          <table:table-cell office:value-type="float" office:value="8.34">
            <text:p>8.34</text:p>
          </table:table-cell>
          <table:table-cell office:value-type="float" office:value="8.67">
            <text:p>8.67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48">
            <text:p>7.48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Usuario</text:p>
          </table:table-cell>
          <table:table-cell office:value-type="string">
            <text:p>Prueb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oficial1999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LAN BASILIO</text:p>
          </table:table-cell>
          <table:table-cell office:value-type="string">
            <text:p>QUEZADA QUEZA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anbailio2004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38">
            <text:p>9.38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92">
            <text:p>9.92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NDREA YARETH</text:p>
          </table:table-cell>
          <table:table-cell office:value-type="string">
            <text:p>QUINTERO HERNA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aquin2007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31">
            <text:p>8.31</text:p>
          </table:table-cell>
          <table:table-cell office:value-type="float" office:value="10.00">
            <text:p>10.00</text:p>
          </table:table-cell>
          <table:table-cell office:value-type="float" office:value="8.34">
            <text:p>8.34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08">
            <text:p>9.08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KARINA ALEXANDRA</text:p>
          </table:table-cell>
          <table:table-cell office:value-type="string">
            <text:p>RAFAEL BAUTIS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afaelkarina828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33">
            <text:p>9.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17">
            <text:p>1.17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ESUS ALEXANDER</text:p>
          </table:table-cell>
          <table:table-cell office:value-type="string">
            <text:p>RAMIREZ ESTRA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amirezestradaj524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LUIS ANTONIO</text:p>
          </table:table-cell>
          <table:table-cell office:value-type="string">
            <text:p>RAMIREZ GALLAR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r2726541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33">
            <text:p>9.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17">
            <text:p>1.17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DIANA</text:p>
          </table:table-cell>
          <table:table-cell office:value-type="string">
            <text:p>RAMIREZ ISL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anaram091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AMIE ALEJANDRA</text:p>
          </table:table-cell>
          <table:table-cell office:value-type="string">
            <text:p>RAMOS CANA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amos.canales.jamiealejandr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31">
            <text:p>8.31</text:p>
          </table:table-cell>
          <table:table-cell office:value-type="float" office:value="10.00">
            <text:p>10.00</text:p>
          </table:table-cell>
          <table:table-cell office:value-type="float" office:value="9.45">
            <text:p>9.45</text:p>
          </table:table-cell>
          <table:table-cell office:value-type="float" office:value="7.33">
            <text:p>7.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39">
            <text:p>4.39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OMAR ANTONIO</text:p>
          </table:table-cell>
          <table:table-cell office:value-type="string">
            <text:p>RAMOS ROM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mar.ramos7986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ISAAC</text:p>
          </table:table-cell>
          <table:table-cell office:value-type="string">
            <text:p>RESENDIZ RODRI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endizisaac13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float" office:value="9.00">
            <text:p>9.00</text:p>
          </table:table-cell>
          <table:table-cell office:value-type="float" office:value="8.34">
            <text:p>8.34</text:p>
          </table:table-cell>
          <table:table-cell office:value-type="float" office:value="9.33">
            <text:p>9.33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93">
            <text:p>8.93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DIEGO ALEXIS</text:p>
          </table:table-cell>
          <table:table-cell office:value-type="string">
            <text:p>REYES COR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egoalexisreyescortes860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UDITH</text:p>
          </table:table-cell>
          <table:table-cell office:value-type="string">
            <text:p>REYES GARC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dithjbmz9394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CARLOS DANIEL</text:p>
          </table:table-cell>
          <table:table-cell office:value-type="string">
            <text:p>REYES LO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yeslopezcarlosdaniel39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ESCUDERO PEREZ</text:p>
          </table:table-cell>
          <table:table-cell office:value-type="string">
            <text:p>ROBERTO CARL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bertescudero.030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ZEE TRINIDAD</text:p>
          </table:table-cell>
          <table:table-cell office:value-type="string">
            <text:p>ROBLES JU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zeetroc0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VALERIA</text:p>
          </table:table-cell>
          <table:table-cell office:value-type="string">
            <text:p>ROBLES RODRI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aleriarobles36350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33">
            <text:p>3.33</text:p>
          </table:table-cell>
          <table:table-cell office:value-type="float" office:value="7.00">
            <text:p>7.00</text:p>
          </table:table-cell>
          <table:table-cell office:value-type="float" office:value="8.34">
            <text:p>8.34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3.08">
            <text:p>3.08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CRISTOPHER ETHAN</text:p>
          </table:table-cell>
          <table:table-cell office:value-type="string">
            <text:p>RODRIGUEZ ALV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era302010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float" office:value="8.00">
            <text:p>8.00</text:p>
          </table:table-cell>
          <table:table-cell office:value-type="float" office:value="9.45">
            <text:p>9.45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8.90">
            <text:p>8.9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BRAYAN EDEMIR</text:p>
          </table:table-cell>
          <table:table-cell office:value-type="string">
            <text:p>RODRIGUEZ GARC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driguebrayan25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NA ITZEL</text:p>
          </table:table-cell>
          <table:table-cell office:value-type="string">
            <text:p>RODRIGUEZ LAZA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tzelrodriguezlazaro132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38">
            <text:p>9.38</text:p>
          </table:table-cell>
          <table:table-cell office:value-type="float" office:value="9.00">
            <text:p>9.00</text:p>
          </table:table-cell>
          <table:table-cell office:value-type="float" office:value="8.89">
            <text:p>8.89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66">
            <text:p>6.66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DIEGO</text:p>
          </table:table-cell>
          <table:table-cell office:value-type="string">
            <text:p>RODRIGUEZ PO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egorodponce123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33">
            <text:p>5.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67">
            <text:p>0.67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CHRISTOPHER GAEL</text:p>
          </table:table-cell>
          <table:table-cell office:value-type="string">
            <text:p>RODRIGUEZ YA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ixiscri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33">
            <text:p>5.33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26">
            <text:p>9.26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LAURA ADADELINE</text:p>
          </table:table-cell>
          <table:table-cell office:value-type="string">
            <text:p>ROMO HERNA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aenromo29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EDGAR OMAR</text:p>
          </table:table-cell>
          <table:table-cell office:value-type="string">
            <text:p>ROMUALDO DOMIN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mualdodomingez21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NGEL</text:p>
          </table:table-cell>
          <table:table-cell office:value-type="string">
            <text:p>RUEDA MENDO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ueda0211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13">
            <text:p>6.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77">
            <text:p>0.77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BRITHANY JAZMIN</text:p>
          </table:table-cell>
          <table:table-cell office:value-type="string">
            <text:p>SALES PE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zminct23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FANNY JAQUELINE</text:p>
          </table:table-cell>
          <table:table-cell office:value-type="string">
            <text:p>SAN MARTIN LO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quelinesm0508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OSHUA</text:p>
          </table:table-cell>
          <table:table-cell office:value-type="string">
            <text:p>SANCHEZ CARRIL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huasc0239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MARIA GUADALUPE</text:p>
          </table:table-cell>
          <table:table-cell office:value-type="string">
            <text:p>SANCHEZ CAYET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s158477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MELANIE</text:p>
          </table:table-cell>
          <table:table-cell office:value-type="string">
            <text:p>SANCHEZ ENCI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lanie.sanchez.enciso0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63">
            <text:p>0.63</text:p>
          </table:table-cell>
          <table:table-cell office:value-type="float" office:value="9.00">
            <text:p>9.00</text:p>
          </table:table-cell>
          <table:table-cell office:value-type="float" office:value="9.45">
            <text:p>9.45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4.63">
            <text:p>4.63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LILIANA</text:p>
          </table:table-cell>
          <table:table-cell office:value-type="string">
            <text:p>SANCHEZ FLO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liasanfl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LEXIS</text:p>
          </table:table-cell>
          <table:table-cell office:value-type="string">
            <text:p>SANCHEZ GALV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issanchezg0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ROBERTO ARMANDO</text:p>
          </table:table-cell>
          <table:table-cell office:value-type="string">
            <text:p>SANCHEZ GUTIER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.armandosg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NGEL ERIX</text:p>
          </table:table-cell>
          <table:table-cell office:value-type="string">
            <text:p>SANCHEZ HERNA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gelerix2000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SERGIO GABRIEL ALFONSO</text:p>
          </table:table-cell>
          <table:table-cell office:value-type="string">
            <text:p>SANCHEZ NO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klrecarged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EDGAR ANIBAL</text:p>
          </table:table-cell>
          <table:table-cell office:value-type="string">
            <text:p>SANCHEZ ORIHUE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reptil2024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SAID ADRIAN</text:p>
          </table:table-cell>
          <table:table-cell office:value-type="string">
            <text:p>SANCHEZ RIV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chez.rivera.said.cb202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50">
            <text:p>7.5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DULCE ANAHI</text:p>
          </table:table-cell>
          <table:table-cell office:value-type="string">
            <text:p>SANTILLAN RE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tillanreyesdulceanahi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DIEGO MARTIN</text:p>
          </table:table-cell>
          <table:table-cell office:value-type="string">
            <text:p>SANTILLAN SORI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esanso084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DANIELA</text:p>
          </table:table-cell>
          <table:table-cell office:value-type="string">
            <text:p>SANTOS SA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s2091406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45">
            <text:p>9.45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9.18">
            <text:p>9.18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SEGOVIA HERNA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goviadaniel450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RAMON</text:p>
          </table:table-cell>
          <table:table-cell office:value-type="string">
            <text:p>SERRANO LO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rranoramon339@gmail.com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77">
            <text:p>4.77</text:p>
          </table:table-cell>
          <table:table-cell office:value-type="float" office:value="9.00">
            <text:p>9.00</text:p>
          </table:table-cell>
          <table:table-cell office:value-type="float" office:value="8.34">
            <text:p>8.34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51">
            <text:p>7.51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KEVIN GIOVANNI</text:p>
          </table:table-cell>
          <table:table-cell office:value-type="string">
            <text:p>SEVILLA LO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iovanniescuela11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50">
            <text:p>7.5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DIEGO HANIEL</text:p>
          </table:table-cell>
          <table:table-cell office:value-type="string">
            <text:p>SOTO DOMIN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ego.soto.dom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9.34">
            <text:p>9.34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MARIA GUADALUPE</text:p>
          </table:table-cell>
          <table:table-cell office:value-type="string">
            <text:p>SOTO QUIR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iag.quirozz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RIADNA YAMILE</text:p>
          </table:table-cell>
          <table:table-cell office:value-type="string">
            <text:p>SOTUYO CONTRER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illerss12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FRANCISCO GABRIEL</text:p>
          </table:table-cell>
          <table:table-cell office:value-type="string">
            <text:p>TAFOYA BAUTIS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ranciscogtb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SURI DALET</text:p>
          </table:table-cell>
          <table:table-cell office:value-type="string">
            <text:p>TIRZO BERN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dalet.bernal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29">
            <text:p>7.29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5.91">
            <text:p>5.91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ESUS</text:p>
          </table:table-cell>
          <table:table-cell office:value-type="string">
            <text:p>TOBIAS GUTIER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g5088711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EVELYN YAMILETH</text:p>
          </table:table-cell>
          <table:table-cell office:value-type="string">
            <text:p>TORRES CEDIL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vecampos281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ENRIQUE</text:p>
          </table:table-cell>
          <table:table-cell office:value-type="string">
            <text:p>TORRES RODRI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rique.tr.247@gmail.com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SHARON ABRIL</text:p>
          </table:table-cell>
          <table:table-cell office:value-type="string">
            <text:p>VALENZUELA CHAV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brilchavero285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ROCIO YAMILET</text:p>
          </table:table-cell>
          <table:table-cell office:value-type="string">
            <text:p>VARGAS CHAVARR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amvargas60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94">
            <text:p>8.94</text:p>
          </table:table-cell>
          <table:table-cell office:value-type="float" office:value="10.00">
            <text:p>10.00</text:p>
          </table:table-cell>
          <table:table-cell office:value-type="float" office:value="9.45">
            <text:p>9.45</text:p>
          </table:table-cell>
          <table:table-cell office:value-type="float" office:value="9.33">
            <text:p>9.33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21">
            <text:p>7.21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AURELIO HERIBERTO</text:p>
          </table:table-cell>
          <table:table-cell office:value-type="string">
            <text:p>VARGAS CORT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argas.aurelioh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38">
            <text:p>9.38</text:p>
          </table:table-cell>
          <table:table-cell office:value-type="float" office:value="10.00">
            <text:p>10.00</text:p>
          </table:table-cell>
          <table:table-cell office:value-type="float" office:value="9.45">
            <text:p>9.45</text:p>
          </table:table-cell>
          <table:table-cell office:value-type="float" office:value="9.33">
            <text:p>9.33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64">
            <text:p>9.64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UAN CARLOS</text:p>
          </table:table-cell>
          <table:table-cell office:value-type="string">
            <text:p>VARGAS GUTIER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argasgutierrezj667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OSE MARTIN</text:p>
          </table:table-cell>
          <table:table-cell office:value-type="string">
            <text:p>VAZQUEZ MONTO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vazquezmontoro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UANA</text:p>
          </table:table-cell>
          <table:table-cell office:value-type="string">
            <text:p>VEGA VEG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itavega30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38">
            <text:p>9.38</text:p>
          </table:table-cell>
          <table:table-cell office:value-type="float" office:value="10.00">
            <text:p>10.00</text:p>
          </table:table-cell>
          <table:table-cell office:value-type="float" office:value="9.45">
            <text:p>9.45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10">
            <text:p>7.1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GERARDO</text:p>
          </table:table-cell>
          <table:table-cell office:value-type="string">
            <text:p>VELA TAMAY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8584961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OCABETH FABIOLA</text:p>
          </table:table-cell>
          <table:table-cell office:value-type="string">
            <text:p>VELAZCO MARTI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lazcoyok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38">
            <text:p>9.38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9.33">
            <text:p>9.33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96">
            <text:p>6.96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VICTOR ANTONIO</text:p>
          </table:table-cell>
          <table:table-cell office:value-type="string">
            <text:p>VENEGAS DIA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ikosantonio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25">
            <text:p>1.25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ISIS MARIAN</text:p>
          </table:table-cell>
          <table:table-cell office:value-type="string">
            <text:p>VENEGAS MONTA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ismvenegasmbj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EDGAR DAVID</text:p>
          </table:table-cell>
          <table:table-cell office:value-type="string">
            <text:p>VENTURA BRAMBIL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nturageisha4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50">
            <text:p>7.5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KEVIN OSIRIS</text:p>
          </table:table-cell>
          <table:table-cell office:value-type="string">
            <text:p>VICENTEÑO SILV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iskhmcclv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IMENA</text:p>
          </table:table-cell>
          <table:table-cell office:value-type="string">
            <text:p>VICTORIANO LICO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imenavictotiano3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JOAQUIN</text:p>
          </table:table-cell>
          <table:table-cell office:value-type="string">
            <text:p>VITE MUN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aquinmunozvite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13">
            <text:p>8.13</text:p>
          </table:table-cell>
          <table:table-cell office:value-type="float" office:value="8.00">
            <text:p>8.00</text:p>
          </table:table-cell>
          <table:table-cell office:value-type="float" office:value="9.45">
            <text:p>9.45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70">
            <text:p>6.70</text:p>
          </table:table-cell>
          <table:table-cell office:value-type="string">
            <text:p>1779683923</text:p>
          </table:table-cell>
        </table:table-row>
        <table:table-row>
          <table:table-cell office:value-type="string">
            <text:p>DIEGO</text:p>
          </table:table-cell>
          <table:table-cell office:value-type="string">
            <text:p>ZUNIGA RE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egozurye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float" office:value="10.00">
            <text:p>10.00</text:p>
          </table:table-cell>
          <table:table-cell office:value-type="float" office:value="9.45">
            <text:p>9.45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27">
            <text:p>9.27</text:p>
          </table:table-cell>
          <table:table-cell office:value-type="string">
            <text:p>17796839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5.0.6+ (Build: 20260415)</meta:generator>
    <meta:initial-creator>DENISSE ODALYS CORONA GUZMAN</meta:initial-creator>
    <meta:creation-date>2026-05-24T22:38:43</meta:creation-date>
    <meta:document-statistic meta:table-count="1" meta:cell-count="0" meta:object-count="0"/>
  </office:meta>
</office:document-meta>
</file>